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299in" table:align="margins"/>
    </style:style>
    <style:style style:name="Table1.A" style:family="table-column">
      <style:table-column-properties style:column-width="3.1299in" style:rel-column-width="368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22f" officeooo:paragraph-rsid="0008b2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b22f" officeooo:paragraph-rsid="0008b2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.1299in" fo:page-height="5.8299in" style:num-format="1" style:print-orientation="portrait" fo:margin-top="0.7874in" fo:margin-bottom="0.7874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15:07:55.813981551</meta:creation-date>
    <dc:date>2026-05-18T15:20:16.768302470</dc:date>
    <meta:editing-duration>PT1M4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